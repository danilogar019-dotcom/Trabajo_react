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Opiniones" table:style-name="ta1">
        <table:table-row>
          <table:table-cell office:value-type="string">
            <text:p>nombre</text:p>
          </table:table-cell>
          <table:table-cell office:value-type="string">
            <text:p>titulo</text:p>
          </table:table-cell>
          <table:table-cell office:value-type="string">
            <text:p>comentario</text:p>
          </table:table-cell>
          <table:table-cell office:value-type="string">
            <text:p>estrellas</text:p>
          </table:table-cell>
          <table:table-cell office:value-type="string">
            <text:p>fecha</text:p>
          </table:table-cell>
          <table:table-cell office:value-type="string">
            <text:p>likes</text:p>
          </table:table-cell>
        </table:table-row>
        <table:table-row>
          <table:table-cell office:value-type="string">
            <text:p>Juan Pérez</text:p>
          </table:table-cell>
          <table:table-cell office:value-type="string">
            <text:p>Increíble viaje</text:p>
          </table:table-cell>
          <table:table-cell office:value-type="string">
            <text:p>Todo estuvo perfecto, la organización impecable.</text:p>
          </table:table-cell>
          <table:table-cell office:value-type="float" office:value="5">
            <text:p>5</text:p>
          </table:table-cell>
          <table:table-cell office:value-type="string">
            <text:p>2024-04-15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Maria Garcia</text:p>
          </table:table-cell>
          <table:table-cell office:value-type="string">
            <text:p>Vistas espectaculares</text:p>
          </table:table-cell>
          <table:table-cell office:value-type="string">
            <text:p>El destino superó mis expectativas.</text:p>
          </table:table-cell>
          <table:table-cell office:value-type="float" office:value="5">
            <text:p>5</text:p>
          </table:table-cell>
          <table:table-cell office:value-type="string">
            <text:p>2024-04-16</text:p>
          </table:table-cell>
          <table:table-cell office:value-type="float" office:value="8">
            <text:p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